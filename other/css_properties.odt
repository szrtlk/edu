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9.7cm" table:align="left"/>
    </style:style>
    <style:style style:name="Таблица1.A" style:family="table-column">
      <style:table-column-properties style:column-width="5.299cm"/>
    </style:style>
    <style:style style:name="Таблица1.B" style:family="table-column">
      <style:table-column-properties style:column-width="7.613cm"/>
    </style:style>
    <style:style style:name="Таблица1.C" style:family="table-column">
      <style:table-column-properties style:column-width="3.286cm"/>
    </style:style>
    <style:style style:name="Таблица1.D" style:family="table-column">
      <style:table-column-properties style:column-width="5.036cm"/>
    </style:style>
    <style:style style:name="Таблица1.E" style:family="table-column">
      <style:table-column-properties style:column-width="1.963cm"/>
    </style:style>
    <style:style style:name="Таблица1.F" style:family="table-column">
      <style:table-column-properties style:column-width="4.302cm"/>
    </style:style>
    <style:style style:name="Таблица1.G" style:family="table-column">
      <style:table-column-properties style:column-width="2.201cm"/>
    </style:style>
    <style:style style:name="Таблица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Таблица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Таблица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1.A9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1.B99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header-rows>
          <table:table-row>
            <table:table-cell table:style-name="Таблица1.A1" office:value-type="string">
              <text:p text:style-name="P1">Name</text:p>
            </table:table-cell>
            <table:table-cell table:style-name="Таблица1.B1" office:value-type="string">
              <text:p text:style-name="P1">Values</text:p>
            </table:table-cell>
            <table:table-cell table:style-name="Таблица1.B1" office:value-type="string">
              <text:p text:style-name="P1">Initial value</text:p>
            </table:table-cell>
            <table:table-cell table:style-name="Таблица1.B1" office:value-type="string">
              <text:p text:style-name="P1">Applies to<text:line-break/>(Default: all)</text:p>
            </table:table-cell>
            <table:table-cell table:style-name="Таблица1.B1" office:value-type="string">
              <text:p text:style-name="P1">Inherited?</text:p>
            </table:table-cell>
            <table:table-cell table:style-name="Таблица1.B1" office:value-type="string">
              <text:p text:style-name="P1">Percentages<text:line-break/>(Default: N/A)</text:p>
            </table:table-cell>
            <table:table-cell table:style-name="Таблица1.B1" office:value-type="string">
              <text:p text:style-name="P1">Media groups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<text:a xlink:type="simple" xlink:href="https://www.w3.org/TR/CSS2/aural.html#propdef-azimuth" text:style-name="Internet_20_link" text:visited-style-name="Visited_20_Internet_20_Link">'azimuth'</text:a> </text:p>
          </table:table-cell>
          <table:table-cell table:style-name="Таблица1.B2" office:value-type="string">
            <text:p text:style-name="Table_20_Contents"><text:a xlink:type="simple" xlink:href="https://www.w3.org/TR/CSS2/aural.html#value-def-angle" text:style-name="Internet_20_link" text:visited-style-name="Visited_20_Internet_20_Link">&lt;angle&gt;</text:a> | [[ left-side | far-left | left | center-left | center | center-right | right | far-right | right-side ] || behind ] | leftwards | rightwards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center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colors.html#propdef-background-attachment" text:style-name="Internet_20_link" text:visited-style-name="Visited_20_Internet_20_Link">'<text:span text:style-name="T1">background-attachment</text:span>'</text:a> </text:p>
          </table:table-cell>
          <table:table-cell table:style-name="Таблица1.B2" office:value-type="string">
            <text:p text:style-name="Table_20_Contents">scroll | fixed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croll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colors.html#propdef-background-color" text:style-name="Internet_20_link" text:visited-style-name="Visited_20_Internet_20_Link">'<text:span text:style-name="T2">background-color</text:span>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color" text:style-name="Internet_20_link" text:visited-style-name="Visited_20_Internet_20_Link">&lt;color&gt;</text:a> | transparent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transparent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colors.html#propdef-background-image" text:style-name="Internet_20_link" text:visited-style-name="Visited_20_Internet_20_Link">'background-image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uri" text:style-name="Internet_20_link" text:visited-style-name="Visited_20_Internet_20_Link">&lt;uri&gt;</text:a>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colors.html#propdef-background-position" text:style-name="Internet_20_link" text:visited-style-name="Visited_20_Internet_20_Link">'background-position'</text:a> </text:p>
          </table:table-cell>
          <table:table-cell table:style-name="Таблица1.B2" office:value-type="string">
            <text:p text:style-name="Table_20_Contents">[ [ <text:a xlink:type="simple" xlink:href="https://www.w3.org/TR/CSS2/syndata.html#value-def-percentage" text:style-name="Internet_20_link" text:visited-style-name="Visited_20_Internet_20_Link">&lt;percentage&gt;</text:a> | <text:a xlink:type="simple" xlink:href="https://www.w3.org/TR/CSS2/syndata.html#value-def-length" text:style-name="Internet_20_link" text:visited-style-name="Visited_20_Internet_20_Link">&lt;length&gt;</text:a> | left | center | right ] [ <text:a xlink:type="simple" xlink:href="https://www.w3.org/TR/CSS2/syndata.html#value-def-percentage" text:style-name="Internet_20_link" text:visited-style-name="Visited_20_Internet_20_Link">&lt;percentage&gt;</text:a> | <text:a xlink:type="simple" xlink:href="https://www.w3.org/TR/CSS2/syndata.html#value-def-length" text:style-name="Internet_20_link" text:visited-style-name="Visited_20_Internet_20_Link">&lt;length&gt;</text:a> | top | center | bottom ]? ] | [ [ left | center | right ] || [ top | center | bottom ] 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0% 0%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the size of the box itself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colors.html#propdef-background-repeat" text:style-name="Internet_20_link" text:visited-style-name="Visited_20_Internet_20_Link">'background-repeat'</text:a> </text:p>
          </table:table-cell>
          <table:table-cell table:style-name="Таблица1.B2" office:value-type="string">
            <text:p text:style-name="Table_20_Contents">repeat | repeat-x | repeat-y | no-repeat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repeat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colors.html#propdef-background" text:style-name="Internet_20_link" text:visited-style-name="Visited_20_Internet_20_Link">'background'</text:a> </text:p>
          </table:table-cell>
          <table:table-cell table:style-name="Таблица1.B2" office:value-type="string">
            <text:p text:style-name="Table_20_Contents">[<text:a xlink:type="simple" xlink:href="https://www.w3.org/TR/CSS2/colors.html#propdef-background-color" text:style-name="Internet_20_link" text:visited-style-name="Visited_20_Internet_20_Link">'background-color'</text:a> || <text:a xlink:type="simple" xlink:href="https://www.w3.org/TR/CSS2/colors.html#propdef-background-image" text:style-name="Internet_20_link" text:visited-style-name="Visited_20_Internet_20_Link">'background-image'</text:a> || <text:a xlink:type="simple" xlink:href="https://www.w3.org/TR/CSS2/colors.html#propdef-background-repeat" text:style-name="Internet_20_link" text:visited-style-name="Visited_20_Internet_20_Link">'background-repeat'</text:a> || <text:a xlink:type="simple" xlink:href="https://www.w3.org/TR/CSS2/colors.html#propdef-background-attachment" text:style-name="Internet_20_link" text:visited-style-name="Visited_20_Internet_20_Link">'background-attachment'</text:a> || <text:a xlink:type="simple" xlink:href="https://www.w3.org/TR/CSS2/colors.html#propdef-background-position" text:style-name="Internet_20_link" text:visited-style-name="Visited_20_Internet_20_Link">'background-position'</text:a>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allowed on 'background-position'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tables.html#propdef-border-collapse" text:style-name="Internet_20_link" text:visited-style-name="Visited_20_Internet_20_Link">'border-collapse'</text:a> </text:p>
          </table:table-cell>
          <table:table-cell table:style-name="Таблица1.B2" office:value-type="string">
            <text:p text:style-name="Table_20_Contents">collapse | separat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parate </text:p>
          </table:table-cell>
          <table:table-cell table:style-name="Таблица1.B2" office:value-type="string">
            <text:p text:style-name="Table_20_Contents">'table' and 'inline-table' elements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border-color" text:style-name="Internet_20_link" text:visited-style-name="Visited_20_Internet_20_Link">'border-color'</text:a> </text:p>
          </table:table-cell>
          <table:table-cell table:style-name="Таблица1.B2" office:value-type="string">
            <text:p text:style-name="Table_20_Contents">[ <text:a xlink:type="simple" xlink:href="https://www.w3.org/TR/CSS2/syndata.html#value-def-color" text:style-name="Internet_20_link" text:visited-style-name="Visited_20_Internet_20_Link">&lt;color&gt;</text:a> | transparent ]{1,4}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tables.html#propdef-border-spacing" text:style-name="Internet_20_link" text:visited-style-name="Visited_20_Internet_20_Link">'border-spacing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<text:a xlink:type="simple" xlink:href="https://www.w3.org/TR/CSS2/syndata.html#value-def-length" text:style-name="Internet_20_link" text:visited-style-name="Visited_20_Internet_20_Link">&lt;length&gt;</text:a>?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0 </text:p>
          </table:table-cell>
          <table:table-cell table:style-name="Таблица1.B2" office:value-type="string">
            <text:p text:style-name="Table_20_Contents">'table' and 'inline-table' elements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border-style" text:style-name="Internet_20_link" text:visited-style-name="Visited_20_Internet_20_Link">'border-style'</text:a> </text:p>
          </table:table-cell>
          <table:table-cell table:style-name="Таблица1.B2" office:value-type="string">
            <text:p text:style-name="Table_20_Contents"><text:a xlink:type="simple" xlink:href="https://www.w3.org/TR/CSS2/box.html#value-def-border-style" text:style-name="Internet_20_link" text:visited-style-name="Visited_20_Internet_20_Link">&lt;border-style&gt;</text:a>{1,4}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border-top" text:style-name="Internet_20_link" text:visited-style-name="Visited_20_Internet_20_Link">'border-top'</text:a> <text:a xlink:type="simple" xlink:href="https://www.w3.org/TR/CSS2/box.html#propdef-border-right" text:style-name="Internet_20_link" text:visited-style-name="Visited_20_Internet_20_Link">'border-right'</text:a> <text:a xlink:type="simple" xlink:href="https://www.w3.org/TR/CSS2/box.html#propdef-border-bottom" text:style-name="Internet_20_link" text:visited-style-name="Visited_20_Internet_20_Link">'border-bottom'</text:a> <text:a xlink:type="simple" xlink:href="https://www.w3.org/TR/CSS2/box.html#propdef-border-left" text:style-name="Internet_20_link" text:visited-style-name="Visited_20_Internet_20_Link">'border-left'</text:a> </text:p>
          </table:table-cell>
          <table:table-cell table:style-name="Таблица1.B2" office:value-type="string">
            <text:p text:style-name="Table_20_Contents">[ <text:a xlink:type="simple" xlink:href="https://www.w3.org/TR/CSS2/box.html#value-def-border-width" text:style-name="Internet_20_link" text:visited-style-name="Visited_20_Internet_20_Link">&lt;border-width&gt;</text:a> || <text:a xlink:type="simple" xlink:href="https://www.w3.org/TR/CSS2/box.html#value-def-border-style" text:style-name="Internet_20_link" text:visited-style-name="Visited_20_Internet_20_Link">&lt;border-style&gt;</text:a> || <text:a xlink:type="simple" xlink:href="https://www.w3.org/TR/CSS2/box.html#propdef-border-top-color" text:style-name="Internet_20_link" text:visited-style-name="Visited_20_Internet_20_Link">'border-top-color'</text:a> 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border-top-color" text:style-name="Internet_20_link" text:visited-style-name="Visited_20_Internet_20_Link">'border-top-color'</text:a> <text:a xlink:type="simple" xlink:href="https://www.w3.org/TR/CSS2/box.html#propdef-border-right-color" text:style-name="Internet_20_link" text:visited-style-name="Visited_20_Internet_20_Link">'border-right-color'</text:a> <text:a xlink:type="simple" xlink:href="https://www.w3.org/TR/CSS2/box.html#propdef-border-bottom-color" text:style-name="Internet_20_link" text:visited-style-name="Visited_20_Internet_20_Link">'border-bottom-color'</text:a> <text:a xlink:type="simple" xlink:href="https://www.w3.org/TR/CSS2/box.html#propdef-border-left-color" text:style-name="Internet_20_link" text:visited-style-name="Visited_20_Internet_20_Link">'border-left-color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color" text:style-name="Internet_20_link" text:visited-style-name="Visited_20_Internet_20_Link">&lt;color&gt;</text:a> | transparent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the value of the 'color' property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border-top-style" text:style-name="Internet_20_link" text:visited-style-name="Visited_20_Internet_20_Link">'border-top-style'</text:a> <text:a xlink:type="simple" xlink:href="https://www.w3.org/TR/CSS2/box.html#propdef-border-right-style" text:style-name="Internet_20_link" text:visited-style-name="Visited_20_Internet_20_Link">'border-right-style'</text:a> <text:a xlink:type="simple" xlink:href="https://www.w3.org/TR/CSS2/box.html#propdef-border-bottom-style" text:style-name="Internet_20_link" text:visited-style-name="Visited_20_Internet_20_Link">'border-bottom-style'</text:a> <text:a xlink:type="simple" xlink:href="https://www.w3.org/TR/CSS2/box.html#propdef-border-left-style" text:style-name="Internet_20_link" text:visited-style-name="Visited_20_Internet_20_Link">'border-left-style'</text:a> </text:p>
          </table:table-cell>
          <table:table-cell table:style-name="Таблица1.B2" office:value-type="string">
            <text:p text:style-name="Table_20_Contents"><text:a xlink:type="simple" xlink:href="https://www.w3.org/TR/CSS2/box.html#value-def-border-style" text:style-name="Internet_20_link" text:visited-style-name="Visited_20_Internet_20_Link">&lt;border-style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border-top-width" text:style-name="Internet_20_link" text:visited-style-name="Visited_20_Internet_20_Link">'border-top-width'</text:a> <text:a xlink:type="simple" xlink:href="https://www.w3.org/TR/CSS2/box.html#propdef-border-right-width" text:style-name="Internet_20_link" text:visited-style-name="Visited_20_Internet_20_Link">'border-right-width'</text:a> <text:a xlink:type="simple" xlink:href="https://www.w3.org/TR/CSS2/box.html#propdef-border-bottom-width" text:style-name="Internet_20_link" text:visited-style-name="Visited_20_Internet_20_Link">'border-bottom-width'</text:a> <text:a xlink:type="simple" xlink:href="https://www.w3.org/TR/CSS2/box.html#propdef-border-left-width" text:style-name="Internet_20_link" text:visited-style-name="Visited_20_Internet_20_Link">'border-left-width'</text:a> </text:p>
          </table:table-cell>
          <table:table-cell table:style-name="Таблица1.B2" office:value-type="string">
            <text:p text:style-name="Table_20_Contents"><text:a xlink:type="simple" xlink:href="https://www.w3.org/TR/CSS2/box.html#value-def-border-width" text:style-name="Internet_20_link" text:visited-style-name="Visited_20_Internet_20_Link">&lt;border-width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medium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border-width" text:style-name="Internet_20_link" text:visited-style-name="Visited_20_Internet_20_Link">'border-width'</text:a> </text:p>
          </table:table-cell>
          <table:table-cell table:style-name="Таблица1.B2" office:value-type="string">
            <text:p text:style-name="Table_20_Contents"><text:a xlink:type="simple" xlink:href="https://www.w3.org/TR/CSS2/box.html#value-def-border-width" text:style-name="Internet_20_link" text:visited-style-name="Visited_20_Internet_20_Link">&lt;border-width&gt;</text:a>{1,4}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<text:soft-page-break/>properti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border" text:style-name="Internet_20_link" text:visited-style-name="Visited_20_Internet_20_Link">'border'</text:a> </text:p>
          </table:table-cell>
          <table:table-cell table:style-name="Таблица1.B2" office:value-type="string">
            <text:p text:style-name="Table_20_Contents">[ <text:a xlink:type="simple" xlink:href="https://www.w3.org/TR/CSS2/box.html#value-def-border-width" text:style-name="Internet_20_link" text:visited-style-name="Visited_20_Internet_20_Link">&lt;border-width&gt;</text:a> || <text:a xlink:type="simple" xlink:href="https://www.w3.org/TR/CSS2/box.html#value-def-border-style" text:style-name="Internet_20_link" text:visited-style-name="Visited_20_Internet_20_Link">&lt;border-style&gt;</text:a> || <text:a xlink:type="simple" xlink:href="https://www.w3.org/TR/CSS2/box.html#propdef-border-top-color" text:style-name="Internet_20_link" text:visited-style-name="Visited_20_Internet_20_Link">'border-top-color'</text:a> 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ren.html#propdef-bottom" text:style-name="Internet_20_link" text:visited-style-name="Visited_20_Internet_20_Link">'bottom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auto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positioned element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height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tables.html#propdef-caption-side" text:style-name="Internet_20_link" text:visited-style-name="Visited_20_Internet_20_Link">'caption-side'</text:a> </text:p>
          </table:table-cell>
          <table:table-cell table:style-name="Таблица1.B2" office:value-type="string">
            <text:p text:style-name="Table_20_Contents">top | bottom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top </text:p>
          </table:table-cell>
          <table:table-cell table:style-name="Таблица1.B2" office:value-type="string">
            <text:p text:style-name="Table_20_Contents">'table-caption' elements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ren.html#propdef-clear" text:style-name="Internet_20_link" text:visited-style-name="Visited_20_Internet_20_Link">'clear'</text:a> </text:p>
          </table:table-cell>
          <table:table-cell table:style-name="Таблица1.B2" office:value-type="string">
            <text:p text:style-name="Table_20_Contents">none | left | right | both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block-level element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fx.html#propdef-clip" text:style-name="Internet_20_link" text:visited-style-name="Visited_20_Internet_20_Link">'clip'</text:a> </text:p>
          </table:table-cell>
          <table:table-cell table:style-name="Таблица1.B2" office:value-type="string">
            <text:p text:style-name="Table_20_Contents"><text:a xlink:type="simple" xlink:href="https://www.w3.org/TR/CSS2/visufx.html#value-def-shape" text:style-name="Internet_20_link" text:visited-style-name="Visited_20_Internet_20_Link">&lt;shape&gt;</text:a> | auto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absolutely positioned element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colors.html#propdef-color" text:style-name="Internet_20_link" text:visited-style-name="Visited_20_Internet_20_Link">'color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color" text:style-name="Internet_20_link" text:visited-style-name="Visited_20_Internet_20_Link">&lt;color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depends on user agent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generate.html#propdef-content" text:style-name="Internet_20_link" text:visited-style-name="Visited_20_Internet_20_Link">'content'</text:a> </text:p>
          </table:table-cell>
          <table:table-cell table:style-name="Таблица1.B2" office:value-type="string">
            <text:p text:style-name="Table_20_Contents">normal | none | [ <text:a xlink:type="simple" xlink:href="https://www.w3.org/TR/CSS2/syndata.html#value-def-string" text:style-name="Internet_20_link" text:visited-style-name="Visited_20_Internet_20_Link">&lt;string&gt;</text:a> | <text:a xlink:type="simple" xlink:href="https://www.w3.org/TR/CSS2/syndata.html#value-def-uri" text:style-name="Internet_20_link" text:visited-style-name="Visited_20_Internet_20_Link">&lt;uri&gt;</text:a> | <text:a xlink:type="simple" xlink:href="https://www.w3.org/TR/CSS2/syndata.html#value-def-counter" text:style-name="Internet_20_link" text:visited-style-name="Visited_20_Internet_20_Link">&lt;counter&gt;</text:a> | attr(<text:a xlink:type="simple" xlink:href="https://www.w3.org/TR/CSS2/syndata.html#value-def-identifier" text:style-name="Internet_20_link" text:visited-style-name="Visited_20_Internet_20_Link">&lt;identifier&gt;</text:a>) | open-quote | close-quote | no-open-quote | no-close-quote ]+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rmal </text:p>
          </table:table-cell>
          <table:table-cell table:style-name="Таблица1.B2" office:value-type="string">
            <text:p text:style-name="Table_20_Contents">:before and :after pseudo-element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all-media-group" text:style-name="Internet_20_link" text:visited-style-name="Visited_20_Internet_20_Link">al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generate.html#propdef-counter-increment" text:style-name="Internet_20_link" text:visited-style-name="Visited_20_Internet_20_Link">'counter-increment'</text:a> </text:p>
          </table:table-cell>
          <table:table-cell table:style-name="Таблица1.B2" office:value-type="string">
            <text:p text:style-name="Table_20_Contents">[ <text:a xlink:type="simple" xlink:href="https://www.w3.org/TR/CSS2/syndata.html#value-def-identifier" text:style-name="Internet_20_link" text:visited-style-name="Visited_20_Internet_20_Link">&lt;identifier&gt;</text:a> <text:a xlink:type="simple" xlink:href="https://www.w3.org/TR/CSS2/syndata.html#value-def-integer" text:style-name="Internet_20_link" text:visited-style-name="Visited_20_Internet_20_Link">&lt;integer&gt;</text:a>? ]+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all-media-group" text:style-name="Internet_20_link" text:visited-style-name="Visited_20_Internet_20_Link">al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generate.html#propdef-counter-reset" text:style-name="Internet_20_link" text:visited-style-name="Visited_20_Internet_20_Link">'counter-reset'</text:a> </text:p>
          </table:table-cell>
          <table:table-cell table:style-name="Таблица1.B2" office:value-type="string">
            <text:p text:style-name="Table_20_Contents">[ <text:a xlink:type="simple" xlink:href="https://www.w3.org/TR/CSS2/syndata.html#value-def-identifier" text:style-name="Internet_20_link" text:visited-style-name="Visited_20_Internet_20_Link">&lt;identifier&gt;</text:a> <text:a xlink:type="simple" xlink:href="https://www.w3.org/TR/CSS2/syndata.html#value-def-integer" text:style-name="Internet_20_link" text:visited-style-name="Visited_20_Internet_20_Link">&lt;integer&gt;</text:a>? ]+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all-media-group" text:style-name="Internet_20_link" text:visited-style-name="Visited_20_Internet_20_Link">al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cue-after" text:style-name="Internet_20_link" text:visited-style-name="Visited_20_Internet_20_Link">'cue-after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uri" text:style-name="Internet_20_link" text:visited-style-name="Visited_20_Internet_20_Link">&lt;uri&gt;</text:a>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cue-before" text:style-name="Internet_20_link" text:visited-style-name="Visited_20_Internet_20_Link">'cue-before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uri" text:style-name="Internet_20_link" text:visited-style-name="Visited_20_Internet_20_Link">&lt;uri&gt;</text:a>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cue" text:style-name="Internet_20_link" text:visited-style-name="Visited_20_Internet_20_Link">'cue'</text:a> </text:p>
          </table:table-cell>
          <table:table-cell table:style-name="Таблица1.B2" office:value-type="string">
            <text:p text:style-name="Table_20_Contents">[ <text:a xlink:type="simple" xlink:href="https://www.w3.org/TR/CSS2/aural.html#propdef-cue-before" text:style-name="Internet_20_link" text:visited-style-name="Visited_20_Internet_20_Link">'cue-before'</text:a> || <text:a xlink:type="simple" xlink:href="https://www.w3.org/TR/CSS2/aural.html#propdef-cue-after" text:style-name="Internet_20_link" text:visited-style-name="Visited_20_Internet_20_Link">'cue-after'</text:a> 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ui.html#propdef-cursor" text:style-name="Internet_20_link" text:visited-style-name="Visited_20_Internet_20_Link">'cursor'</text:a> </text:p>
          </table:table-cell>
          <table:table-cell table:style-name="Таблица1.B2" office:value-type="string">
            <text:p text:style-name="Table_20_Contents">[ [<text:a xlink:type="simple" xlink:href="https://www.w3.org/TR/CSS2/syndata.html#value-def-uri" text:style-name="Internet_20_link" text:visited-style-name="Visited_20_Internet_20_Link">&lt;uri&gt;</text:a> ,]* [ auto | crosshair | default | pointer | move | e-resize | ne-resize | nw-resize | n-resize | se-resize | sw-resize | s-resize | w-resize | text | wait | help | progress ] 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, <text:a xlink:type="simple" xlink:href="https://www.w3.org/TR/CSS2/media.html#interactive-media-group" text:style-name="Internet_20_link" text:visited-style-name="Visited_20_Internet_20_Link">interactive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ren.html#propdef-direction" text:style-name="Internet_20_link" text:visited-style-name="Visited_20_Internet_20_Link">'direction'</text:a> </text:p>
          </table:table-cell>
          <table:table-cell table:style-name="Таблица1.B2" office:value-type="string">
            <text:p text:style-name="Table_20_Contents">ltr | rtl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ltr </text:p>
          </table:table-cell>
          <table:table-cell table:style-name="Таблица1.B2" office:value-type="string">
            <text:p text:style-name="Table_20_Contents">all elements, but see prose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ren.html#propdef-display" text:style-name="Internet_20_link" text:visited-style-name="Visited_20_Internet_20_Link">'display'</text:a> </text:p>
          </table:table-cell>
          <table:table-cell table:style-name="Таблица1.B2" office:value-type="string">
            <text:p text:style-name="Table_20_Contents">inline | block | list-item | inline-block | table | inline-table | table-row-group | table-header-group | table-footer-group | table-row | table-column-group | table-column | table-cell | table-caption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inlin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all-media-group" text:style-name="Internet_20_link" text:visited-style-name="Visited_20_Internet_20_Link">al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elevation" text:style-name="Internet_20_link" text:visited-style-name="Visited_20_Internet_20_Link">'elevation'</text:a> </text:p>
          </table:table-cell>
          <table:table-cell table:style-name="Таблица1.B2" office:value-type="string">
            <text:p text:style-name="Table_20_Contents"><text:a xlink:type="simple" xlink:href="https://www.w3.org/TR/CSS2/aural.html#value-def-angle" text:style-name="Internet_20_link" text:visited-style-name="Visited_20_Internet_20_Link">&lt;angle&gt;</text:a> | below | level | above | higher | lower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level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tables.html#propdef-empty-cells" text:style-name="Internet_20_link" text:visited-style-name="Visited_20_Internet_20_Link">'empty-cells'</text:a> </text:p>
          </table:table-cell>
          <table:table-cell table:style-name="Таблица1.B2" office:value-type="string">
            <text:p text:style-name="Table_20_Contents">show | hid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how </text:p>
          </table:table-cell>
          <table:table-cell table:style-name="Таблица1.B2" office:value-type="string">
            <text:p text:style-name="Table_20_Contents">'table-cell' elements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ren.html#propdef-float" text:style-name="Internet_20_link" text:visited-style-name="Visited_20_Internet_20_Link">'float'</text:a> </text:p>
          </table:table-cell>
          <table:table-cell table:style-name="Таблица1.B2" office:value-type="string">
            <text:p text:style-name="Table_20_Contents">left | right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all, but see <text:a xlink:type="simple" xlink:href="https://www.w3.org/TR/CSS2/visuren.html#dis-pos-flo" text:style-name="Internet_20_link" text:visited-style-name="Visited_20_Internet_20_Link">9.7</text:a>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ext:soft-page-break/>
        <table:table-row>
          <table:table-cell table:style-name="Таблица1.A2" office:value-type="string">
            <text:p text:style-name="Table_20_Contents"><text:a xlink:type="simple" xlink:href="https://www.w3.org/TR/CSS2/fonts.html#propdef-font-family" text:style-name="Internet_20_link" text:visited-style-name="Visited_20_Internet_20_Link">'font-family'</text:a> </text:p>
          </table:table-cell>
          <table:table-cell table:style-name="Таблица1.B2" office:value-type="string">
            <text:p text:style-name="Table_20_Contents">[[ <text:a xlink:type="simple" xlink:href="https://www.w3.org/TR/CSS2/fonts.html#value-def-family-name" text:style-name="Internet_20_link" text:visited-style-name="Visited_20_Internet_20_Link">&lt;family-name&gt;</text:a> | <text:a xlink:type="simple" xlink:href="https://www.w3.org/TR/CSS2/fonts.html#value-def-generic-family" text:style-name="Internet_20_link" text:visited-style-name="Visited_20_Internet_20_Link">&lt;generic-family&gt;</text:a> ] [, <text:a xlink:type="simple" xlink:href="https://www.w3.org/TR/CSS2/fonts.html#value-def-family-name" text:style-name="Internet_20_link" text:visited-style-name="Visited_20_Internet_20_Link">&lt;family-name&gt;</text:a>| <text:a xlink:type="simple" xlink:href="https://www.w3.org/TR/CSS2/fonts.html#value-def-generic-family" text:style-name="Internet_20_link" text:visited-style-name="Visited_20_Internet_20_Link">&lt;generic-family&gt;</text:a>]* 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depends on user agent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fonts.html#propdef-font-size" text:style-name="Internet_20_link" text:visited-style-name="Visited_20_Internet_20_Link">'font-size'</text:a> </text:p>
          </table:table-cell>
          <table:table-cell table:style-name="Таблица1.B2" office:value-type="string">
            <text:p text:style-name="Table_20_Contents"><text:a xlink:type="simple" xlink:href="https://www.w3.org/TR/CSS2/fonts.html#value-def-absolute-size" text:style-name="Internet_20_link" text:visited-style-name="Visited_20_Internet_20_Link">&lt;absolute-size&gt;</text:a> | <text:a xlink:type="simple" xlink:href="https://www.w3.org/TR/CSS2/fonts.html#value-def-relative-size" text:style-name="Internet_20_link" text:visited-style-name="Visited_20_Internet_20_Link">&lt;relative-size&gt;</text:a> | 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medium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refer to inherited font size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fonts.html#propdef-font-style" text:style-name="Internet_20_link" text:visited-style-name="Visited_20_Internet_20_Link">'font-style'</text:a> </text:p>
          </table:table-cell>
          <table:table-cell table:style-name="Таблица1.B2" office:value-type="string">
            <text:p text:style-name="Table_20_Contents">normal | italic | obliqu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rmal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fonts.html#propdef-font-variant" text:style-name="Internet_20_link" text:visited-style-name="Visited_20_Internet_20_Link">'font-variant'</text:a> </text:p>
          </table:table-cell>
          <table:table-cell table:style-name="Таблица1.B2" office:value-type="string">
            <text:p text:style-name="Table_20_Contents">normal | small-caps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rmal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fonts.html#propdef-font-weight" text:style-name="Internet_20_link" text:visited-style-name="Visited_20_Internet_20_Link">'font-weight'</text:a> </text:p>
          </table:table-cell>
          <table:table-cell table:style-name="Таблица1.B2" office:value-type="string">
            <text:p text:style-name="Table_20_Contents">normal | bold | bolder | lighter | 100 | 200 | 300 | 400 | 500 | 600 | 700 | 800 | 900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rmal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fonts.html#propdef-font" text:style-name="Internet_20_link" text:visited-style-name="Visited_20_Internet_20_Link">'font'</text:a> </text:p>
          </table:table-cell>
          <table:table-cell table:style-name="Таблица1.B2" office:value-type="string">
            <text:p text:style-name="Table_20_Contents">[ [ <text:a xlink:type="simple" xlink:href="https://www.w3.org/TR/CSS2/fonts.html#propdef-font-style" text:style-name="Internet_20_link" text:visited-style-name="Visited_20_Internet_20_Link">'font-style'</text:a> || <text:a xlink:type="simple" xlink:href="https://www.w3.org/TR/CSS2/fonts.html#propdef-font-variant" text:style-name="Internet_20_link" text:visited-style-name="Visited_20_Internet_20_Link">'font-variant'</text:a> || <text:a xlink:type="simple" xlink:href="https://www.w3.org/TR/CSS2/fonts.html#propdef-font-weight" text:style-name="Internet_20_link" text:visited-style-name="Visited_20_Internet_20_Link">'font-weight'</text:a> ]? <text:a xlink:type="simple" xlink:href="https://www.w3.org/TR/CSS2/fonts.html#propdef-font-size" text:style-name="Internet_20_link" text:visited-style-name="Visited_20_Internet_20_Link">'font-size'</text:a> [ / <text:a xlink:type="simple" xlink:href="https://www.w3.org/TR/CSS2/visudet.html#propdef-line-height" text:style-name="Internet_20_link" text:visited-style-name="Visited_20_Internet_20_Link">'line-height'</text:a> ]? <text:a xlink:type="simple" xlink:href="https://www.w3.org/TR/CSS2/fonts.html#propdef-font-family" text:style-name="Internet_20_link" text:visited-style-name="Visited_20_Internet_20_Link">'font-family'</text:a> ] | caption | icon | menu | message-box | small-caption | status-bar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det.html#propdef-height" text:style-name="Internet_20_link" text:visited-style-name="Visited_20_Internet_20_Link">'height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auto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all elements but non-replaced inline elements, table columns, and column group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see prose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ren.html#propdef-left" text:style-name="Internet_20_link" text:visited-style-name="Visited_20_Internet_20_Link">'left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auto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positioned element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width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text.html#propdef-letter-spacing" text:style-name="Internet_20_link" text:visited-style-name="Visited_20_Internet_20_Link">'letter-spacing'</text:a> </text:p>
          </table:table-cell>
          <table:table-cell table:style-name="Таблица1.B2" office:value-type="string">
            <text:p text:style-name="Table_20_Contents">normal | 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rmal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det.html#propdef-line-height" text:style-name="Internet_20_link" text:visited-style-name="Visited_20_Internet_20_Link">'line-height'</text:a> </text:p>
          </table:table-cell>
          <table:table-cell table:style-name="Таблица1.B2" office:value-type="string">
            <text:p text:style-name="Table_20_Contents">normal | <text:a xlink:type="simple" xlink:href="https://www.w3.org/TR/CSS2/syndata.html#value-def-number" text:style-name="Internet_20_link" text:visited-style-name="Visited_20_Internet_20_Link">&lt;number&gt;</text:a> | 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rmal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refer to the font size of the element itself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generate.html#propdef-list-style-image" text:style-name="Internet_20_link" text:visited-style-name="Visited_20_Internet_20_Link">'list-style-image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uri" text:style-name="Internet_20_link" text:visited-style-name="Visited_20_Internet_20_Link">&lt;uri&gt;</text:a>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elements with 'display: list-item'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generate.html#propdef-list-style-position" text:style-name="Internet_20_link" text:visited-style-name="Visited_20_Internet_20_Link">'list-style-position'</text:a> </text:p>
          </table:table-cell>
          <table:table-cell table:style-name="Таблица1.B2" office:value-type="string">
            <text:p text:style-name="Table_20_Contents">inside | outsid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outside </text:p>
          </table:table-cell>
          <table:table-cell table:style-name="Таблица1.B2" office:value-type="string">
            <text:p text:style-name="Table_20_Contents">elements with 'display: list-item'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generate.html#propdef-list-style-type" text:style-name="Internet_20_link" text:visited-style-name="Visited_20_Internet_20_Link">'list-style-type'</text:a> </text:p>
          </table:table-cell>
          <table:table-cell table:style-name="Таблица1.B2" office:value-type="string">
            <text:p text:style-name="Table_20_Contents">disc | circle | square | decimal | decimal-leading-zero | lower-roman | upper-roman | lower-greek | lower-latin | upper-latin | armenian | georgian | lower-alpha | upper-alpha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disc </text:p>
          </table:table-cell>
          <table:table-cell table:style-name="Таблица1.B2" office:value-type="string">
            <text:p text:style-name="Table_20_Contents">elements with 'display: list-item'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generate.html#propdef-list-style" text:style-name="Internet_20_link" text:visited-style-name="Visited_20_Internet_20_Link">'list-style'</text:a> </text:p>
          </table:table-cell>
          <table:table-cell table:style-name="Таблица1.B2" office:value-type="string">
            <text:p text:style-name="Table_20_Contents">[ <text:a xlink:type="simple" xlink:href="https://www.w3.org/TR/CSS2/generate.html#propdef-list-style-type" text:style-name="Internet_20_link" text:visited-style-name="Visited_20_Internet_20_Link">'list-style-type'</text:a> || <text:a xlink:type="simple" xlink:href="https://www.w3.org/TR/CSS2/generate.html#propdef-list-style-position" text:style-name="Internet_20_link" text:visited-style-name="Visited_20_Internet_20_Link">'list-style-position'</text:a> || <text:a xlink:type="simple" xlink:href="https://www.w3.org/TR/CSS2/generate.html#propdef-list-style-image" text:style-name="Internet_20_link" text:visited-style-name="Visited_20_Internet_20_Link">'list-style-image'</text:a> 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elements with 'display: list-item'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margin-right" text:style-name="Internet_20_link" text:visited-style-name="Visited_20_Internet_20_Link">'margin-right'</text:a> <text:a xlink:type="simple" xlink:href="https://www.w3.org/TR/CSS2/box.html#propdef-margin-left" text:style-name="Internet_20_link" text:visited-style-name="Visited_20_Internet_20_Link">'margin-left'</text:a> </text:p>
          </table:table-cell>
          <table:table-cell table:style-name="Таблица1.B2" office:value-type="string">
            <text:p text:style-name="Table_20_Contents"><text:a xlink:type="simple" xlink:href="https://www.w3.org/TR/CSS2/box.html#value-def-margin-width" text:style-name="Internet_20_link" text:visited-style-name="Visited_20_Internet_20_Link">&lt;margin-width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0 </text:p>
          </table:table-cell>
          <table:table-cell table:style-name="Таблица1.B2" office:value-type="string">
            <text:p text:style-name="Table_20_Contents">all elements except elements with table display types other than table-caption, <text:soft-page-break/>table and inline-table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width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margin-top" text:style-name="Internet_20_link" text:visited-style-name="Visited_20_Internet_20_Link">'margin-top'</text:a> <text:a xlink:type="simple" xlink:href="https://www.w3.org/TR/CSS2/box.html#propdef-margin-bottom" text:style-name="Internet_20_link" text:visited-style-name="Visited_20_Internet_20_Link">'margin-bottom'</text:a> </text:p>
          </table:table-cell>
          <table:table-cell table:style-name="Таблица1.B2" office:value-type="string">
            <text:p text:style-name="Table_20_Contents"><text:a xlink:type="simple" xlink:href="https://www.w3.org/TR/CSS2/box.html#value-def-margin-width" text:style-name="Internet_20_link" text:visited-style-name="Visited_20_Internet_20_Link">&lt;margin-width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0 </text:p>
          </table:table-cell>
          <table:table-cell table:style-name="Таблица1.B2" office:value-type="string">
            <text:p text:style-name="Table_20_Contents">all elements except elements with table display types other than table-caption, table and inline-table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width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margin" text:style-name="Internet_20_link" text:visited-style-name="Visited_20_Internet_20_Link">'margin'</text:a> </text:p>
          </table:table-cell>
          <table:table-cell table:style-name="Таблица1.B2" office:value-type="string">
            <text:p text:style-name="Table_20_Contents"><text:a xlink:type="simple" xlink:href="https://www.w3.org/TR/CSS2/box.html#value-def-margin-width" text:style-name="Internet_20_link" text:visited-style-name="Visited_20_Internet_20_Link">&lt;margin-width&gt;</text:a>{1,4}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all elements except elements with table display types other than table-caption, table and inline-table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width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det.html#propdef-max-height" text:style-name="Internet_20_link" text:visited-style-name="Visited_20_Internet_20_Link">'max-height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all elements but non-replaced inline elements, table columns, and column group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see prose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det.html#propdef-max-width" text:style-name="Internet_20_link" text:visited-style-name="Visited_20_Internet_20_Link">'max-width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all elements but non-replaced inline elements, table rows, and row group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width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det.html#propdef-min-height" text:style-name="Internet_20_link" text:visited-style-name="Visited_20_Internet_20_Link">'min-height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0 </text:p>
          </table:table-cell>
          <table:table-cell table:style-name="Таблица1.B2" office:value-type="string">
            <text:p text:style-name="Table_20_Contents">all elements but non-replaced inline elements, table columns, and column group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see prose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det.html#propdef-min-width" text:style-name="Internet_20_link" text:visited-style-name="Visited_20_Internet_20_Link">'min-width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0 </text:p>
          </table:table-cell>
          <table:table-cell table:style-name="Таблица1.B2" office:value-type="string">
            <text:p text:style-name="Table_20_Contents">all elements but non-replaced inline elements, table rows, and row group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width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page.html#propdef-orphans" text:style-name="Internet_20_link" text:visited-style-name="Visited_20_Internet_20_Link">'orphans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integer" text:style-name="Internet_20_link" text:visited-style-name="Visited_20_Internet_20_Link">&lt;integer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2 </text:p>
          </table:table-cell>
          <table:table-cell table:style-name="Таблица1.B2" office:value-type="string">
            <text:p text:style-name="Table_20_Contents">block container elements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, <text:a xlink:type="simple" xlink:href="https://www.w3.org/TR/CSS2/media.html#paged-media-group" text:style-name="Internet_20_link" text:visited-style-name="Visited_20_Internet_20_Link">paged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ui.html#propdef-outline-color" text:style-name="Internet_20_link" text:visited-style-name="Visited_20_Internet_20_Link">'outline-color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color" text:style-name="Internet_20_link" text:visited-style-name="Visited_20_Internet_20_Link">&lt;color&gt;</text:a> | invert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invert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, <text:a xlink:type="simple" xlink:href="https://www.w3.org/TR/CSS2/media.html#interactive-media-group" text:style-name="Internet_20_link" text:visited-style-name="Visited_20_Internet_20_Link">interactive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ui.html#propdef-outline-style" text:style-name="Internet_20_link" text:visited-style-name="Visited_20_Internet_20_Link">'outline-style'</text:a> </text:p>
          </table:table-cell>
          <table:table-cell table:style-name="Таблица1.B2" office:value-type="string">
            <text:p text:style-name="Table_20_Contents"><text:a xlink:type="simple" xlink:href="https://www.w3.org/TR/CSS2/box.html#value-def-border-style" text:style-name="Internet_20_link" text:visited-style-name="Visited_20_Internet_20_Link">&lt;border-style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, <text:a xlink:type="simple" xlink:href="https://www.w3.org/TR/CSS2/media.html#interactive-media-group" text:style-name="Internet_20_link" text:visited-style-name="Visited_20_Internet_20_Link">interactive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ui.html#propdef-outline-width" text:style-name="Internet_20_link" text:visited-style-name="Visited_20_Internet_20_Link">'outline-width'</text:a> </text:p>
          </table:table-cell>
          <table:table-cell table:style-name="Таблица1.B2" office:value-type="string">
            <text:p text:style-name="Table_20_Contents"><text:a xlink:type="simple" xlink:href="https://www.w3.org/TR/CSS2/box.html#value-def-border-width" text:style-name="Internet_20_link" text:visited-style-name="Visited_20_Internet_20_Link">&lt;border-width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medium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, <text:a xlink:type="simple" xlink:href="https://www.w3.org/TR/CSS2/media.html#interactive-media-group" text:style-name="Internet_20_link" text:visited-style-name="Visited_20_Internet_20_Link">interactive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ui.html#propdef-outline" text:style-name="Internet_20_link" text:visited-style-name="Visited_20_Internet_20_Link">'outline'</text:a> </text:p>
          </table:table-cell>
          <table:table-cell table:style-name="Таблица1.B2" office:value-type="string">
            <text:p text:style-name="Table_20_Contents">[ <text:a xlink:type="simple" xlink:href="https://www.w3.org/TR/CSS2/ui.html#propdef-outline-color" text:style-name="Internet_20_link" text:visited-style-name="Visited_20_Internet_20_Link">'outline-color'</text:a> || <text:a xlink:type="simple" xlink:href="https://www.w3.org/TR/CSS2/ui.html#propdef-outline-style" text:style-name="Internet_20_link" text:visited-style-name="Visited_20_Internet_20_Link">'outline-style'</text:a> || <text:a xlink:type="simple" xlink:href="https://www.w3.org/TR/CSS2/ui.html#propdef-outline-width" text:style-name="Internet_20_link" text:visited-style-name="Visited_20_Internet_20_Link">'outline-width'</text:a> 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, <text:a xlink:type="simple" xlink:href="https://www.w3.org/TR/CSS2/media.html#interactive-media-group" text:style-name="Internet_20_link" text:visited-style-name="Visited_20_Internet_20_Link">interactive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fx.html#propdef-overflow" text:style-name="Internet_20_link" text:visited-style-name="Visited_20_Internet_20_Link">'overflow'</text:a> </text:p>
          </table:table-cell>
          <table:table-cell table:style-name="Таблица1.B2" office:value-type="string">
            <text:p text:style-name="Table_20_Contents">visible | hidden | scroll | auto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visible </text:p>
          </table:table-cell>
          <table:table-cell table:style-name="Таблица1.B2" office:value-type="string">
            <text:p text:style-name="Table_20_Contents">block container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padding-top" text:style-name="Internet_20_link" text:visited-style-name="Visited_20_Internet_20_Link">'padding-top'</text:a> <text:a xlink:type="simple" xlink:href="https://www.w3.org/TR/CSS2/box.html#propdef-padding-right" text:style-name="Internet_20_link" text:visited-style-name="Visited_20_Internet_20_Link">'padding-right'</text:a> <text:a xlink:type="simple" xlink:href="https://www.w3.org/TR/CSS2/box.html#propdef-padding-bottom" text:style-name="Internet_20_link" text:visited-style-name="Visited_20_Internet_20_Link">'padding-bottom'</text:a> <text:a xlink:type="simple" xlink:href="https://www.w3.org/TR/CSS2/box.html#propdef-padding-left" text:style-name="Internet_20_link" text:visited-style-name="Visited_20_Internet_20_Link">'padding-left'</text:a> </text:p>
          </table:table-cell>
          <table:table-cell table:style-name="Таблица1.B2" office:value-type="string">
            <text:p text:style-name="Table_20_Contents"><text:a xlink:type="simple" xlink:href="https://www.w3.org/TR/CSS2/box.html#value-def-padding-width" text:style-name="Internet_20_link" text:visited-style-name="Visited_20_Internet_20_Link">&lt;padding-width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0 </text:p>
          </table:table-cell>
          <table:table-cell table:style-name="Таблица1.B2" office:value-type="string">
            <text:p text:style-name="Table_20_Contents">all elements except table-row-group, table-header-group, table-footer-group, <text:soft-page-break/>table-row, table-column-group and table-column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width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box.html#propdef-padding" text:style-name="Internet_20_link" text:visited-style-name="Visited_20_Internet_20_Link">'padding'</text:a> </text:p>
          </table:table-cell>
          <table:table-cell table:style-name="Таблица1.B2" office:value-type="string">
            <text:p text:style-name="Table_20_Contents"><text:a xlink:type="simple" xlink:href="https://www.w3.org/TR/CSS2/box.html#value-def-padding-width" text:style-name="Internet_20_link" text:visited-style-name="Visited_20_Internet_20_Link">&lt;padding-width&gt;</text:a>{1,4}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all elements except table-row-group, table-header-group, table-footer-group, table-row, table-column-group and table-column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width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page.html#propdef-page-break-after" text:style-name="Internet_20_link" text:visited-style-name="Visited_20_Internet_20_Link">'page-break-after'</text:a> </text:p>
          </table:table-cell>
          <table:table-cell table:style-name="Таблица1.B2" office:value-type="string">
            <text:p text:style-name="Table_20_Contents">auto | always | avoid | left | right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block-level elements (but see text)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, <text:a xlink:type="simple" xlink:href="https://www.w3.org/TR/CSS2/media.html#paged-media-group" text:style-name="Internet_20_link" text:visited-style-name="Visited_20_Internet_20_Link">paged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page.html#propdef-page-break-before" text:style-name="Internet_20_link" text:visited-style-name="Visited_20_Internet_20_Link">'page-break-before'</text:a> </text:p>
          </table:table-cell>
          <table:table-cell table:style-name="Таблица1.B2" office:value-type="string">
            <text:p text:style-name="Table_20_Contents">auto | always | avoid | left | right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block-level elements (but see text)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, <text:a xlink:type="simple" xlink:href="https://www.w3.org/TR/CSS2/media.html#paged-media-group" text:style-name="Internet_20_link" text:visited-style-name="Visited_20_Internet_20_Link">paged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page.html#propdef-page-break-inside" text:style-name="Internet_20_link" text:visited-style-name="Visited_20_Internet_20_Link">'page-break-inside'</text:a> </text:p>
          </table:table-cell>
          <table:table-cell table:style-name="Таблица1.B2" office:value-type="string">
            <text:p text:style-name="Table_20_Contents">avoid | auto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block-level elements (but see text)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, <text:a xlink:type="simple" xlink:href="https://www.w3.org/TR/CSS2/media.html#paged-media-group" text:style-name="Internet_20_link" text:visited-style-name="Visited_20_Internet_20_Link">paged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pause-after" text:style-name="Internet_20_link" text:visited-style-name="Visited_20_Internet_20_Link">'pause-after'</text:a> </text:p>
          </table:table-cell>
          <table:table-cell table:style-name="Таблица1.B2" office:value-type="string">
            <text:p text:style-name="Table_20_Contents"><text:a xlink:type="simple" xlink:href="https://www.w3.org/TR/CSS2/aural.html#value-def-time" text:style-name="Internet_20_link" text:visited-style-name="Visited_20_Internet_20_Link">&lt;time&gt;</text:a> | <text:a xlink:type="simple" xlink:href="https://www.w3.org/TR/CSS2/syndata.html#value-def-percentage" text:style-name="Internet_20_link" text:visited-style-name="Visited_20_Internet_20_Link">&lt;percentage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0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see prose 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pause-before" text:style-name="Internet_20_link" text:visited-style-name="Visited_20_Internet_20_Link">'pause-before'</text:a> </text:p>
          </table:table-cell>
          <table:table-cell table:style-name="Таблица1.B2" office:value-type="string">
            <text:p text:style-name="Table_20_Contents"><text:a xlink:type="simple" xlink:href="https://www.w3.org/TR/CSS2/aural.html#value-def-time" text:style-name="Internet_20_link" text:visited-style-name="Visited_20_Internet_20_Link">&lt;time&gt;</text:a> | <text:a xlink:type="simple" xlink:href="https://www.w3.org/TR/CSS2/syndata.html#value-def-percentage" text:style-name="Internet_20_link" text:visited-style-name="Visited_20_Internet_20_Link">&lt;percentage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0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see prose 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pause" text:style-name="Internet_20_link" text:visited-style-name="Visited_20_Internet_20_Link">'pause'</text:a> </text:p>
          </table:table-cell>
          <table:table-cell table:style-name="Таблица1.B2" office:value-type="string">
            <text:p text:style-name="Table_20_Contents">[ [<text:a xlink:type="simple" xlink:href="https://www.w3.org/TR/CSS2/aural.html#value-def-time" text:style-name="Internet_20_link" text:visited-style-name="Visited_20_Internet_20_Link">&lt;time&gt;</text:a> | <text:a xlink:type="simple" xlink:href="https://www.w3.org/TR/CSS2/syndata.html#value-def-percentage" text:style-name="Internet_20_link" text:visited-style-name="Visited_20_Internet_20_Link">&lt;percentage&gt;</text:a>]{1,2} 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ee individual properti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see descriptions of 'pause-before' and 'pause-after' 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pitch-range" text:style-name="Internet_20_link" text:visited-style-name="Visited_20_Internet_20_Link">'pitch-range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number" text:style-name="Internet_20_link" text:visited-style-name="Visited_20_Internet_20_Link">&lt;number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50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pitch" text:style-name="Internet_20_link" text:visited-style-name="Visited_20_Internet_20_Link">'pitch'</text:a> </text:p>
          </table:table-cell>
          <table:table-cell table:style-name="Таблица1.B2" office:value-type="string">
            <text:p text:style-name="Table_20_Contents"><text:a xlink:type="simple" xlink:href="https://www.w3.org/TR/CSS2/aural.html#value-def-frequency" text:style-name="Internet_20_link" text:visited-style-name="Visited_20_Internet_20_Link">&lt;frequency&gt;</text:a> | x-low | low | medium | high | x-high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medium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play-during" text:style-name="Internet_20_link" text:visited-style-name="Visited_20_Internet_20_Link">'play-during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uri" text:style-name="Internet_20_link" text:visited-style-name="Visited_20_Internet_20_Link">&lt;uri&gt;</text:a> [ mix || repeat ]? | auto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ren.html#propdef-position" text:style-name="Internet_20_link" text:visited-style-name="Visited_20_Internet_20_Link">'position'</text:a> </text:p>
          </table:table-cell>
          <table:table-cell table:style-name="Таблица1.B2" office:value-type="string">
            <text:p text:style-name="Table_20_Contents">static | relative | absolute | fixed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static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generate.html#propdef-quotes" text:style-name="Internet_20_link" text:visited-style-name="Visited_20_Internet_20_Link">'quotes'</text:a> </text:p>
          </table:table-cell>
          <table:table-cell table:style-name="Таблица1.B2" office:value-type="string">
            <text:p text:style-name="Table_20_Contents">[<text:a xlink:type="simple" xlink:href="https://www.w3.org/TR/CSS2/syndata.html#value-def-string" text:style-name="Internet_20_link" text:visited-style-name="Visited_20_Internet_20_Link">&lt;string&gt;</text:a> <text:a xlink:type="simple" xlink:href="https://www.w3.org/TR/CSS2/syndata.html#value-def-string" text:style-name="Internet_20_link" text:visited-style-name="Visited_20_Internet_20_Link">&lt;string&gt;</text:a>]+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depends on user agent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richness" text:style-name="Internet_20_link" text:visited-style-name="Visited_20_Internet_20_Link">'richness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number" text:style-name="Internet_20_link" text:visited-style-name="Visited_20_Internet_20_Link">&lt;number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50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ren.html#propdef-right" text:style-name="Internet_20_link" text:visited-style-name="Visited_20_Internet_20_Link">'right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auto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positioned element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width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speak-header" text:style-name="Internet_20_link" text:visited-style-name="Visited_20_Internet_20_Link">'speak-header'</text:a> </text:p>
          </table:table-cell>
          <table:table-cell table:style-name="Таблица1.B2" office:value-type="string">
            <text:p text:style-name="Table_20_Contents">once | always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once </text:p>
          </table:table-cell>
          <table:table-cell table:style-name="Таблица1.B2" office:value-type="string">
            <text:p text:style-name="Table_20_Contents">elements that have table header information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speak-numeral" text:style-name="Internet_20_link" text:visited-style-name="Visited_20_Internet_20_Link">'speak-numeral'</text:a> </text:p>
          </table:table-cell>
          <table:table-cell table:style-name="Таблица1.B2" office:value-type="string">
            <text:p text:style-name="Table_20_Contents">digits | continuous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continuou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speak-punctuation" text:style-name="Internet_20_link" text:visited-style-name="Visited_20_Internet_20_Link">'speak-punctuation'</text:a> </text:p>
          </table:table-cell>
          <table:table-cell table:style-name="Таблица1.B2" office:value-type="string">
            <text:p text:style-name="Table_20_Contents">code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speak" text:style-name="Internet_20_link" text:visited-style-name="Visited_20_Internet_20_Link">'speak'</text:a> </text:p>
          </table:table-cell>
          <table:table-cell table:style-name="Таблица1.B2" office:value-type="string">
            <text:p text:style-name="Table_20_Contents">normal | none | spell-out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rmal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speech-rate" text:style-name="Internet_20_link" text:visited-style-name="Visited_20_Internet_20_Link">'speech-rate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number" text:style-name="Internet_20_link" text:visited-style-name="Visited_20_Internet_20_Link">&lt;number&gt;</text:a> | x-slow | slow | medium | fast | x-fast | faster | slower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medium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stress" text:style-name="Internet_20_link" text:visited-style-name="Visited_20_Internet_20_Link">'stress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number" text:style-name="Internet_20_link" text:visited-style-name="Visited_20_Internet_20_Link">&lt;number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50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ext:soft-page-break/>
        <table:table-row>
          <table:table-cell table:style-name="Таблица1.A2" office:value-type="string">
            <text:p text:style-name="Table_20_Contents"><text:a xlink:type="simple" xlink:href="https://www.w3.org/TR/CSS2/tables.html#propdef-table-layout" text:style-name="Internet_20_link" text:visited-style-name="Visited_20_Internet_20_Link">'table-layout'</text:a> </text:p>
          </table:table-cell>
          <table:table-cell table:style-name="Таблица1.B2" office:value-type="string">
            <text:p text:style-name="Table_20_Contents">auto | fixed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'table' and 'inline-table' element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text.html#propdef-text-align" text:style-name="Internet_20_link" text:visited-style-name="Visited_20_Internet_20_Link">'text-align'</text:a> </text:p>
          </table:table-cell>
          <table:table-cell table:style-name="Таблица1.B2" office:value-type="string">
            <text:p text:style-name="Table_20_Contents">left | right | center | justify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 nameless value that acts as 'left' if 'direction' is 'ltr', 'right' if 'direction' is 'rtl' </text:p>
          </table:table-cell>
          <table:table-cell table:style-name="Таблица1.B2" office:value-type="string">
            <text:p text:style-name="Table_20_Contents">block containers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text.html#propdef-text-decoration" text:style-name="Internet_20_link" text:visited-style-name="Visited_20_Internet_20_Link">'text-decoration'</text:a> </text:p>
          </table:table-cell>
          <table:table-cell table:style-name="Таблица1.B2" office:value-type="string">
            <text:p text:style-name="Table_20_Contents">none | [ underline || overline || line-through || blink 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no (see prose)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text.html#propdef-text-indent" text:style-name="Internet_20_link" text:visited-style-name="Visited_20_Internet_20_Link">'text-indent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0 </text:p>
          </table:table-cell>
          <table:table-cell table:style-name="Таблица1.B2" office:value-type="string">
            <text:p text:style-name="Table_20_Contents">block containers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refer to width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text.html#propdef-text-transform" text:style-name="Internet_20_link" text:visited-style-name="Visited_20_Internet_20_Link">'text-transform'</text:a> </text:p>
          </table:table-cell>
          <table:table-cell table:style-name="Таблица1.B2" office:value-type="string">
            <text:p text:style-name="Table_20_Contents">capitalize | uppercase | lowercase | no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n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ren.html#propdef-top" text:style-name="Internet_20_link" text:visited-style-name="Visited_20_Internet_20_Link">'top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auto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positioned element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height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ren.html#propdef-unicode-bidi" text:style-name="Internet_20_link" text:visited-style-name="Visited_20_Internet_20_Link">'unicode-bidi'</text:a> </text:p>
          </table:table-cell>
          <table:table-cell table:style-name="Таблица1.B2" office:value-type="string">
            <text:p text:style-name="Table_20_Contents">normal | embed | bidi-overrid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rmal </text:p>
          </table:table-cell>
          <table:table-cell table:style-name="Таблица1.B2" office:value-type="string">
            <text:p text:style-name="Table_20_Contents">all elements, but see prose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det.html#propdef-vertical-align" text:style-name="Internet_20_link" text:visited-style-name="Visited_20_Internet_20_Link">'vertical-align'</text:a> </text:p>
          </table:table-cell>
          <table:table-cell table:style-name="Таблица1.B2" office:value-type="string">
            <text:p text:style-name="Table_20_Contents">baseline | sub | super | top | text-top | middle | bottom | text-bottom | <text:a xlink:type="simple" xlink:href="https://www.w3.org/TR/CSS2/syndata.html#value-def-percentage" text:style-name="Internet_20_link" text:visited-style-name="Visited_20_Internet_20_Link">&lt;percentage&gt;</text:a> | 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baseline </text:p>
          </table:table-cell>
          <table:table-cell table:style-name="Таблица1.B2" office:value-type="string">
            <text:p text:style-name="Table_20_Contents">inline-level and 'table-cell' element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the 'line-height' of the element itself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fx.html#propdef-visibility" text:style-name="Internet_20_link" text:visited-style-name="Visited_20_Internet_20_Link">'visibility'</text:a> </text:p>
          </table:table-cell>
          <table:table-cell table:style-name="Таблица1.B2" office:value-type="string">
            <text:p text:style-name="Table_20_Contents">visible | hidden | collaps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visible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voice-family" text:style-name="Internet_20_link" text:visited-style-name="Visited_20_Internet_20_Link">'voice-family'</text:a> </text:p>
          </table:table-cell>
          <table:table-cell table:style-name="Таблица1.B2" office:value-type="string">
            <text:p text:style-name="Table_20_Contents">[[<text:a xlink:type="simple" xlink:href="https://www.w3.org/TR/CSS2/aural.html#value-def-specific-voice" text:style-name="Internet_20_link" text:visited-style-name="Visited_20_Internet_20_Link">&lt;specific-voice&gt;</text:a> | <text:a xlink:type="simple" xlink:href="https://www.w3.org/TR/CSS2/aural.html#value-def-generic-voice" text:style-name="Internet_20_link" text:visited-style-name="Visited_20_Internet_20_Link">&lt;generic-voice&gt;</text:a> ],]* [<text:a xlink:type="simple" xlink:href="https://www.w3.org/TR/CSS2/aural.html#value-def-specific-voice" text:style-name="Internet_20_link" text:visited-style-name="Visited_20_Internet_20_Link">&lt;specific-voice&gt;</text:a> | <text:a xlink:type="simple" xlink:href="https://www.w3.org/TR/CSS2/aural.html#value-def-generic-voice" text:style-name="Internet_20_link" text:visited-style-name="Visited_20_Internet_20_Link">&lt;generic-voice&gt;</text:a> ]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depends on user agent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aural.html#propdef-volume" text:style-name="Internet_20_link" text:visited-style-name="Visited_20_Internet_20_Link">'volume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number" text:style-name="Internet_20_link" text:visited-style-name="Visited_20_Internet_20_Link">&lt;number&gt;</text:a> | <text:a xlink:type="simple" xlink:href="https://www.w3.org/TR/CSS2/syndata.html#value-def-percentage" text:style-name="Internet_20_link" text:visited-style-name="Visited_20_Internet_20_Link">&lt;percentage&gt;</text:a> | silent | x-soft | soft | medium | loud | x-loud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medium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refer to inherited value </text:p>
          </table:table-cell>
          <table:table-cell table:style-name="Таблица1.B2" office:value-type="string">
            <text:p text:style-name="Table_20_Contents"><text:a xlink:type="simple" xlink:href="https://www.w3.org/TR/CSS2/aural.html#aural-media-group" text:style-name="Internet_20_link" text:visited-style-name="Visited_20_Internet_20_Link">aur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text.html#propdef-white-space" text:style-name="Internet_20_link" text:visited-style-name="Visited_20_Internet_20_Link">'white-space'</text:a> </text:p>
          </table:table-cell>
          <table:table-cell table:style-name="Таблица1.B2" office:value-type="string">
            <text:p text:style-name="Table_20_Contents">normal | pre | nowrap | pre-wrap | pre-line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rmal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page.html#propdef-widows" text:style-name="Internet_20_link" text:visited-style-name="Visited_20_Internet_20_Link">'widows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integer" text:style-name="Internet_20_link" text:visited-style-name="Visited_20_Internet_20_Link">&lt;integer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2 </text:p>
          </table:table-cell>
          <table:table-cell table:style-name="Таблица1.B2" office:value-type="string">
            <text:p text:style-name="Table_20_Contents">block container elements 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, <text:a xlink:type="simple" xlink:href="https://www.w3.org/TR/CSS2/media.html#paged-media-group" text:style-name="Internet_20_link" text:visited-style-name="Visited_20_Internet_20_Link">paged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visudet.html#propdef-width" text:style-name="Internet_20_link" text:visited-style-name="Visited_20_Internet_20_Link">'width'</text:a> </text:p>
          </table:table-cell>
          <table:table-cell table:style-name="Таблица1.B2" office:value-type="string">
            <text:p text:style-name="Table_20_Contents">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syndata.html#value-def-percentage" text:style-name="Internet_20_link" text:visited-style-name="Visited_20_Internet_20_Link">&lt;percentage&gt;</text:a> | auto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auto </text:p>
          </table:table-cell>
          <table:table-cell table:style-name="Таблица1.B2" office:value-type="string">
            <text:p text:style-name="Table_20_Contents">all elements but non-replaced inline elements, table rows, and row groups </text:p>
          </table:table-cell>
          <table:table-cell table:style-name="Таблица1.B2" office:value-type="string">
            <text:p text:style-name="Table_20_Contents">no </text:p>
          </table:table-cell>
          <table:table-cell table:style-name="Таблица1.B2" office:value-type="string">
            <text:p text:style-name="Table_20_Contents">refer to width of containing block 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https://www.w3.org/TR/CSS2/text.html#propdef-word-spacing" text:style-name="Internet_20_link" text:visited-style-name="Visited_20_Internet_20_Link">'word-spacing'</text:a> </text:p>
          </table:table-cell>
          <table:table-cell table:style-name="Таблица1.B2" office:value-type="string">
            <text:p text:style-name="Table_20_Contents">normal | <text:a xlink:type="simple" xlink:href="https://www.w3.org/TR/CSS2/syndata.html#value-def-length" text:style-name="Internet_20_link" text:visited-style-name="Visited_20_Internet_20_Link">&lt;length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2" office:value-type="string">
            <text:p text:style-name="Table_20_Contents">normal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yes </text:p>
          </table:table-cell>
          <table:table-cell table:style-name="Таблица1.B2" office:value-type="string">
            <text:p text:style-name="Table_20_Contents"><text:s/></text:p>
          </table:table-cell>
          <table:table-cell table:style-name="Таблица1.B2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 </text:p>
          </table:table-cell>
        </table:table-row>
        <table:table-row>
          <table:table-cell table:style-name="Таблица1.A99" office:value-type="string">
            <text:p text:style-name="Table_20_Contents"><text:a xlink:type="simple" xlink:href="https://www.w3.org/TR/CSS2/visuren.html#propdef-z-index" text:style-name="Internet_20_link" text:visited-style-name="Visited_20_Internet_20_Link">'z-index'</text:a> </text:p>
          </table:table-cell>
          <table:table-cell table:style-name="Таблица1.B99" office:value-type="string">
            <text:p text:style-name="Table_20_Contents">auto | <text:a xlink:type="simple" xlink:href="https://www.w3.org/TR/CSS2/syndata.html#value-def-integer" text:style-name="Internet_20_link" text:visited-style-name="Visited_20_Internet_20_Link">&lt;integer&gt;</text:a> | <text:a xlink:type="simple" xlink:href="https://www.w3.org/TR/CSS2/cascade.html#value-def-inherit" text:style-name="Internet_20_link" text:visited-style-name="Visited_20_Internet_20_Link">inherit</text:a> </text:p>
          </table:table-cell>
          <table:table-cell table:style-name="Таблица1.B99" office:value-type="string">
            <text:p text:style-name="Table_20_Contents">auto </text:p>
          </table:table-cell>
          <table:table-cell table:style-name="Таблица1.B99" office:value-type="string">
            <text:p text:style-name="Table_20_Contents">positioned elements </text:p>
          </table:table-cell>
          <table:table-cell table:style-name="Таблица1.B99" office:value-type="string">
            <text:p text:style-name="Table_20_Contents">no </text:p>
          </table:table-cell>
          <table:table-cell table:style-name="Таблица1.B99" office:value-type="string">
            <text:p text:style-name="Table_20_Contents"><text:s/></text:p>
          </table:table-cell>
          <table:table-cell table:style-name="Таблица1.B99" office:value-type="string">
            <text:p text:style-name="Table_20_Contents"><text:a xlink:type="simple" xlink:href="https://www.w3.org/TR/CSS2/media.html#visual-media-group" text:style-name="Internet_20_link" text:visited-style-name="Visited_20_Internet_20_Link">visual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39:30.074941944</meta:creation-date>
    <dc:date>2023-03-16T19:49:08.750410706</dc:date>
    <meta:editing-duration>PT8M21S</meta:editing-duration>
    <meta:editing-cycles>2</meta:editing-cycles>
    <meta:generator>LibreOffice/7.4.4.2$Linux_X86_64 LibreOffice_project/40$Build-2</meta:generator>
    <meta:document-statistic meta:table-count="1" meta:image-count="0" meta:object-count="0" meta:page-count="6" meta:paragraph-count="693" meta:word-count="1722" meta:character-count="11582" meta:non-whitespace-character-count="9739"/>
  </office:meta>
</office:document-meta>
</file>